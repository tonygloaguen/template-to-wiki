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Install-party Linux</text:p>
      <text:p>Auteur : Hatlab</text:p>
      <text:p>Catégories : Divers, Logiciel &amp; Programmation</text:p>
      <text:p>Mots-clés : linux, usb, installation, windows</text:p>
      <text:p>Licence : Attribution (CC BY)</text:p>
      <text:p>Résumé court</text:p>
      <text:p>Préparer et accompagner l'installation de Linux sur un ordinateur personnel pendant un atelier collectif.</text:p>
      <text:p>Introduction</text:p>
      <text:p>Ce tutoriel sert de support de test pour une install-party Linux organisée au Hatlab.</text:p>
      <text:p>Il décrit les étapes principales pour télécharger une image ISO, créer une clé USB bootable, démarrer un PC dessus puis installer Linux.</text:p>
      <text:p>Liste des matériaux</text:p>
      <text:p>- Une clé USB de 8 Go minimum</text:p>
      <text:p>- Un ordinateur compatible avec Linux</text:p>
      <text:p>- Une connexion Internet stable</text:p>
      <text:p>- Une sauvegarde récente des données importantes</text:p>
      <text:p>Liste des outils</text:p>
      <text:p>- Un navigateur web</text:p>
      <text:p>- Un outil de création de clé USB bootable</text:p>
      <text:p>- Le menu de démarrage ou le BIOS/UEFI du PC</text:p>
      <text:p>Etape n°1 - Télécharger l’image ISO Linux</text:p>
      <text:p>Choisir une distribution Linux adaptée au public de l'atelier, par exemple Ubuntu ou Linux Mint.</text:p>
      <text:p>Télécharger l'image ISO depuis le site officiel de la distribution.</text:p>
      <text:p>Vérifier si possible la somme de contrôle fournie par le site.</text:p>
      <text:p>Image : iso_linux.png</text:p>
      <text:p>Etape n°2 - Préparer la clé USB bootable</text:p>
      <text:p>Brancher la clé USB puis ouvrir l'outil de création de support bootable.</text:p>
      <text:p>Sélectionner l'image ISO téléchargée et la clé USB cible.</text:p>
      <text:p>Lancer l'écriture puis attendre la fin de l'opération avant de retirer la clé.</text:p>
      <text:p>Image : cle_usb_bootable.png</text:p>
      <text:p>Etape n°3 - Démarrer le PC sur la clé USB</text:p>
      <text:p>Redémarrer l'ordinateur avec la clé USB branchée.</text:p>
      <text:p>Ouvrir le menu de démarrage avec la touche indiquée par le constructeur, souvent F12, F10, Échap ou Suppr.</text:p>
      <text:p>Choisir la clé USB dans la liste des périphériques de démarrage.</text:p>
      <text:p>Image : bios_boot_menu.png</text:p>
      <text:p>Etape n°4 - Installer Linux</text:p>
      <text:p>Tester le système en mode live avant de lancer l'installation.</text:p>
      <text:p>Choisir la langue, le clavier, le fuseau horaire et le type d'installation.</text:p>
      <text:p>Relire les choix de partitionnement avant de valider l'écriture sur le disque.</text:p>
      <text:p>Image : installation_linux.png</text:p>
      <text:p>Notes et références</text:p>
      <text:p>- Sauvegarder les données Windows avant toute modification du disque.</text:p>
      <text:p>- Utiliser les pages officielles de la distribution choisie pour télécharger l'ISO.</text:p>
      <text:p>- Prévoir du temps pour les mises à jour après l'installation.</text:p>
    </office:text>
  </office:body>
</office:document-content>
</file>

<file path=styles.xml><?xml version="1.0" encoding="utf-8"?>
<office:document-styles xmlns:office="urn:oasis:names:tc:opendocument:xmlns:office:1.0">
</office:document-styles>
</file>

<file path=meta.xml><?xml version="1.0" encoding="utf-8"?>
<office:document-meta xmlns:office="urn:oasis:names:tc:opendocument:xmlns:office:1.0" xmlns:meta="urn:oasis:names:tc:opendocument:xmlns:meta:1.0">
  <office:meta>
    <meta:generator>tools/create_example_odt.py</meta:generator>
  </office:meta>
</office:document-meta>
</file>